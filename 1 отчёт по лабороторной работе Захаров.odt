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2000002A3B8BC8938.png" manifest:media-type="image/png"/>
  <manifest:file-entry manifest:full-path="Pictures/100000010000028C000000502FD378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cb1f2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cb1f2"/>
    </style:style>
    <style:style style:name="P3" style:family="paragraph" style:parent-style-name="Standard">
      <style:paragraph-properties fo:line-height="150%" fo:text-align="center" style:justify-single-word="false" fo:text-indent="1.251cm" style:auto-text-indent="false"/>
      <style:text-properties officeooo:paragraph-rsid="001cb1f2"/>
    </style:style>
    <style:style style:name="P4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cb1f2"/>
    </style:style>
    <style:style style:name="P5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e66ef"/>
    </style:style>
    <style:style style:name="P6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e52c1"/>
    </style:style>
    <style:style style:name="P7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fo:font-weight="bold" officeooo:paragraph-rsid="001cb1f2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cb1f2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paragraph-rsid="001e66ef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paragraph-rsid="001cb1f2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 fo:text-indent="1.251cm" style:auto-text-indent="false"/>
      <style:text-properties fo:language="en" fo:country="US" fo:font-weight="normal" officeooo:rsid="001e66ef" officeooo:paragraph-rsid="001e66ef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1e52c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fd955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e66ef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f6bb8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officeooo:rsid="001cb1f2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officeooo:rsid="001e66ef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Лабораторная работа № </text:span><text:span text:style-name="T2">1</text:span></text:p>
      <text:p text:style-name="P3" loext:marker-style-name="T1"><text:span text:style-name="T1">ВВЕДЕНИ</text:span><text:span text:style-name="T9">Е</text:span><text:span text:style-name="T1"> В ЯЗЫК ПРОГРАММИРОВАНИЯ PYTHON</text:span></text:p>
      <text:p text:style-name="P7" loext:marker-style-name="T1"/>
      <text:p text:style-name="P1" loext:marker-style-name="T6"><text:span text:style-name="T1">Цель работы</text:span><text:span text:style-name="T6">: изучить понятие и свойства алгоритмов и получить базовые навыки написания кода на языке Python.</text:span></text:p>
      <text:p text:style-name="P1" loext:marker-style-name="T6"><text:span text:style-name="T6"/></text:p>
      <text:p text:style-name="P2" loext:marker-style-name="T6"><text:span text:style-name="T6">Вариант №</text:span><text:span text:style-name="T8">1</text:span></text:p>
      <text:p text:style-name="P1" loext:marker-style-name="T6"><text:span text:style-name="T1">Задание:</text:span><text:span text:style-name="T7"> <text:s/>Общая часть задания:</text:span></text:p>
      <text:p text:style-name="P1" loext:marker-style-name="T6"><text:span text:style-name="T7">Задание 1. Разработайте линейный алгоритм и составьте его блок-</text:span></text:p>
      <text:p text:style-name="P5" loext:marker-style-name="T6"><text:span text:style-name="T7">схему для вычисления выражения, указанного в индивидуальном <text:tab/>варианте. Ввод исходных данных реализовать с клавиатуры. Номер</text:span></text:p>
      <text:p text:style-name="P5" loext:marker-style-name="T6"><text:span text:style-name="T7">варианта задания соответствует номеру фамилии студента в списке <text:tab/>учебной подгруппы. </text:span></text:p>
      <text:p text:style-name="P5" loext:marker-style-name="T6"><text:span text:style-name="T7">Задание 2. Создайте консольное приложение, которое реализует линейный <text:tab/>алгоритм, разработанный при выполнении первого задания.</text:span></text:p>
      <text:p text:style-name="P1" loext:marker-style-name="T1"><text:span text:style-name="T1">Блок схема:</text:span></text:p>
      <text:p text:style-name="P8" loext:marker-style-name="T1"><draw:frame draw:style-name="fr2" draw:name="Изображение1" text:anchor-type="char" svg:width="11.038cm" svg:height="11.846cm" draw:z-index="0"><draw:image xlink:href="Pictures/10000001000002B2000002A3B8BC8938.png" xlink:type="simple" xlink:show="embed" xlink:actuate="onLoad" draw:mime-type="image/png"/></draw:frame></text:p>
      <text:p text:style-name="P8" loext:marker-style-name="T1"/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oft-page-break/><text:span text:style-name="T1">Листинг: </text:span></text:p>
      <text:p text:style-name="P9" loext:marker-style-name="T1"><text:span text:style-name="T6">import math</text:span></text:p>
      <text:p text:style-name="P10" loext:marker-style-name="T1"><text:span text:style-name="T6"/></text:p>
      <text:p text:style-name="P10" loext:marker-style-name="T1"><text:span text:style-name="T6">x = float(2.45)</text:span></text:p>
      <text:p text:style-name="P10" loext:marker-style-name="T1"><text:span text:style-name="T6">y = float(-0.423 * 10**(-2)) <text:s text:c="3"/></text:span></text:p>
      <text:p text:style-name="P10" loext:marker-style-name="T1"><text:span text:style-name="T6">z = float(1.232 * 10**(3))</text:span></text:p>
      <text:p text:style-name="P10" loext:marker-style-name="T1"><text:span text:style-name="T6"/></text:p>
      <text:p text:style-name="P10" loext:marker-style-name="T1"><text:span text:style-name="T6">S = (x**(2*y) + math.e**(y-1)) / (1 + x * abs(y - math.tan(z))) +10 * x**(1/3) — math.log(z)</text:span></text:p>
      <text:p text:style-name="P10" loext:marker-style-name="T1"><text:span text:style-name="T6"/></text:p>
      <text:p text:style-name="P11" loext:marker-style-name="T1"><text:span text:style-name="T6">print(x)</text:span></text:p>
      <text:p text:style-name="P11" loext:marker-style-name="T1"><text:span text:style-name="T6">print(y)</text:span></text:p>
      <text:p text:style-name="P11" loext:marker-style-name="T1"><text:span text:style-name="T6">print(z)</text:span></text:p>
      <text:p text:style-name="P10" loext:marker-style-name="T1"><text:span text:style-name="T6">print(S)</text:span></text:p>
      <text:p text:style-name="P1"/>
      <text:p text:style-name="P6" loext:marker-style-name="T1"><text:span text:style-name="T1">Результаты выполнения программы:</text:span></text:p>
      <text:p text:style-name="P6" loext:marker-style-name="T1"><draw:frame draw:style-name="fr1" draw:name="Изображение2" text:anchor-type="char" svg:x="1.136cm" svg:y="0cm" svg:width="14.744cm" svg:height="2.085cm" draw:z-index="1"><draw:image xlink:href="Pictures/100000010000028C000000502FD37871.png" xlink:type="simple" xlink:show="embed" xlink:actuate="onLoad" draw:mime-type="image/png"/></draw:frame></text:p>
      <text:p text:style-name="P5" loext:marker-style-name="T1"><text:span text:style-name="T1">Вывод: </text:span><text:span text:style-name="T3">В </text:span><text:span text:style-name="T5">ходе выполнения </text:span><text:span text:style-name="T3">лабораторной работ</text:span><text:span text:style-name="T5">ы</text:span><text:span text:style-name="T3"> было </text:span><text:span text:style-name="T5">сделано</text:span><text:span text:style-name="T3"> <text:tab/>задание в котором нужно </text:span><text:span text:style-name="T4">было р</text:span><text:span text:style-name="T3">азработа</text:span><text:span text:style-name="T4">ть</text:span><text:span text:style-name="T3"> линейный алгоритм </text:span><text:span text:style-name="T4">и <text:tab/>создать консольное приложение, которое реализует линейный <text:tab/>алгоритм, разработанный при выполнении первого зада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7:35:49.856000000</meta:creation-date>
    <dc:date>2025-10-21T22:35:49.805000000</dc:date>
    <meta:editing-duration>PT1H12M20S</meta:editing-duration>
    <meta:editing-cycles>5</meta:editing-cycles>
    <meta:generator>LibreOffice/7.6.4.1$Windows_X86_64 LibreOffice_project/e19e193f88cd6c0525a17fb7a176ed8e6a3e2aa1</meta:generator>
    <meta:document-statistic meta:table-count="0" meta:image-count="2" meta:object-count="0" meta:page-count="2" meta:paragraph-count="22" meta:word-count="150" meta:character-count="1101" meta:non-whitespace-character-count="959"/>
  </office:meta>
</office:document-meta>
</file>