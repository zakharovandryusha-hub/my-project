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rame_20_contents">
      <style:text-properties officeooo:rsid="000ab0af" officeooo:paragraph-rsid="000ab0af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b0af"/>
    </style:style>
    <style:style style:name="P3" style:family="paragraph" style:parent-style-name="Standard">
      <style:paragraph-properties fo:text-align="center" style:justify-single-word="false"/>
      <style:text-properties officeooo:paragraph-rsid="000ab0af"/>
    </style:style>
    <style:style style:name="P4" style:family="paragraph" style:parent-style-name="Standard">
      <style:paragraph-properties fo:margin-left="2.498cm" fo:text-align="center" style:justify-single-word="false" fo:text-indent="1.249cm" style:auto-text-indent="false"/>
      <style:text-properties officeooo:paragraph-rsid="000ab0af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ab0af" style:font-size-asian="12pt" style:font-weight-asian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00ab0af" style:font-size-asian="14pt" style:font-weight-asian="bold"/>
    </style:style>
    <style:style style:name="P7" style:family="paragraph" style:parent-style-name="Standard">
      <style:paragraph-properties fo:margin-top="0.212cm" fo:margin-bottom="0.353cm" style:contextual-spacing="false" fo:text-indent="2cm" style:auto-text-indent="false"/>
      <style:text-properties style:font-name="Times New Roman" fo:font-size="14pt" fo:font-weight="bold" officeooo:paragraph-rsid="000ab0af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0ab0af" style:font-size-asian="14pt" style:font-style-asian="italic"/>
    </style:style>
    <style:style style:name="P9" style:family="paragraph" style:parent-style-name="Standard">
      <style:paragraph-properties fo:margin-top="0.212cm" fo:margin-bottom="0.353cm" style:contextual-spacing="false" fo:text-indent="2cm" style:auto-text-indent="false"/>
      <style:text-properties officeooo:paragraph-rsid="000ab0af"/>
    </style:style>
    <style:style style:name="P10" style:family="paragraph" style:parent-style-name="Standard">
      <style:paragraph-properties fo:text-indent="2cm" style:auto-text-indent="false"/>
      <style:text-properties officeooo:paragraph-rsid="000ab0af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font-weight="bold" officeooo:rsid="000ab0af" style:font-size-asian="14pt" style:font-weight-asian="bold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4" style:family="text">
      <style:text-properties style:font-name="Times New Roman" fo:font-size="14pt" fo:font-style="italic" fo:font-weight="bold" officeooo:rsid="000ab0af" style:font-size-asian="14pt" style:font-style-asian="italic" style:font-weight-asian="bold"/>
    </style:style>
    <style:style style:name="T5" style:family="text">
      <style:text-properties style:font-name="Times New Roman" fo:font-size="14pt" fo:font-style="italic" style:font-size-asian="14pt" style:font-style-asian="italic"/>
    </style:style>
    <style:style style:name="T6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officeooo:rsid="000ab0af" style:font-size-asian="14pt" style:font-style-asian="italic" style:font-weight-asian="bold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14pt" fo:language="en" fo:country="US" fo:font-weight="bold" officeooo:rsid="000ab0af" style:font-size-asian="14pt" style:font-weight-asian="bold" loext:padding="0cm" loext:border="none"/>
    </style:style>
    <style:style style:name="T10" style:family="text">
      <style:text-properties style:font-name="Times New Roman" fo:font-size="14pt" fo:language="ru" fo:country="RU" fo:font-weight="bold" officeooo:rsid="000ab0af" style:font-size-asian="14pt" style:font-weight-asian="bold" loext:padding="0cm" loext:border="none"/>
    </style:style>
    <style:style style:name="T11" style:family="text">
      <style:text-properties style:font-name="Times New Roman" fo:font-size="12pt" fo:font-weight="bold" style:font-size-asian="12pt" style:font-weight-asian="bold"/>
    </style:style>
    <style:style style:name="T12" style:family="text">
      <style:text-properties style:font-name="Times New Roman" fo:font-size="12pt" style:font-size-asian="12pt"/>
    </style:style>
    <style:style style:name="T13" style:family="text">
      <style:text-properties style:font-name="Times New Roman" fo:font-size="26pt" fo:font-weight="bold" style:font-size-asian="26pt" style:font-weight-asian="bold"/>
    </style:style>
    <style:style style:name="T14" style:family="text">
      <style:text-properties style:font-name="Times New Roman" fo:font-size="20pt" fo:font-weight="bold" style:font-size-asian="20pt" style:font-weight-asian="bold"/>
    </style:style>
    <style:style style:name="T15" style:family="text">
      <style:text-properties style:font-name="Times New Roman" fo:font-size="16pt" fo:font-weight="bold" style:font-size-asian="16pt" style:font-weight-asian="bold"/>
    </style:style>
    <style:style style:name="T16" style:family="text">
      <style:text-properties style:font-name="Times New Roman" fo:font-size="9pt" style:font-size-asian="9pt"/>
    </style:style>
    <style:style style:name="gr1" style:family="graphic">
      <style:graphic-properties draw:stroke="solid" svg:stroke-width="0.035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397cm" fo:min-width="1.65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0.397cm" fo:min-width="7.08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0.397cm" fo:min-width="5.69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85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1"><text:span text:style-name="T11">МИНИСТЕРСТВО НАУКИ И ВЫСШЕГО ОБРАЗОВАНИЯ РФ</text:span></text:p>
      <text:p text:style-name="P5" loext:marker-style-name="T11"><draw:line text:anchor-type="char" draw:z-index="0" draw:name="Picture 1" draw:style-name="gr5" draw:text-style-name="P11" svg:x1="3.642cm" svg:y1="0.353cm" svg:x2="12.683cm" svg:y2="0.354cm"><text:p/></draw:line></text:p>
      <text:p text:style-name="P2" loext:marker-style-name="T12"><text:span text:style-name="T12">ФЕДЕРАЛЬНОЕ ГОСУДАРСТВЕННОЕ БЮДЖЕТНОЕ ОБРАЗОВАТЕЛЬНОЕ<text:line-break/>УЧРЕЖДЕНИЕ ВЫСШЕГО ОБРАЗОВАНИЯ</text:span></text:p>
      <text:p text:style-name="P2" loext:marker-style-name="T1"><text:span text:style-name="T1">«ЮЖНО-РОССИЙСКИЙ ГОСУДАРСТВЕННЫЙ</text:span></text:p>
      <text:p text:style-name="P2" loext:marker-style-name="T1"><text:span text:style-name="T1">ПОЛИТЕХНИЧЕСКИЙ УНИВЕРСИТЕТ (НПИ) </text:span></text:p>
      <text:p text:style-name="P2" loext:marker-style-name="T1"><text:span text:style-name="T1">имени М.И. ПЛАТОВА»</text:span></text:p>
      <text:p text:style-name="P6" loext:marker-style-name="T1"><draw:line text:anchor-type="char" draw:z-index="1" draw:name="Picture 2" draw:style-name="gr5" draw:text-style-name="P11" svg:x1="0.863cm" svg:y1="0.362cm" svg:x2="15.707cm" svg:y2="0.363cm"><text:p/></draw:line></text:p>
      <text:p text:style-name="P7" loext:marker-style-name="T1"/>
      <text:p text:style-name="P9" loext:marker-style-name="T8"><draw:line text:anchor-type="char" draw:z-index="2" draw:name="Picture 3" draw:style-name="gr1" draw:text-style-name="P11" svg:x1="5.472cm" svg:y1="0.746cm" svg:x2="15.078cm" svg:y2="0.767cm"><text:p/></draw:line><draw:line text:anchor-type="char" draw:z-index="9" draw:name="Picture 10" draw:style-name="gr1" draw:text-style-name="P11" svg:x1="-0.011cm" svg:y1="1.284cm" svg:x2="2.647cm" svg:y2="1.284cm"><text:p/></draw:line><text:span text:style-name="T1">ФАКУЛЬТЕТ</text:span><text:span text:style-name="T2">:</text:span><text:span text:style-name="T1"> <text:s/></text:span><text:span text:style-name="T10">Факультет информационных технологий и управления</text:span><text:span text:style-name="T1"><text:tab/> <text:s text:c="2"/></text:span></text:p>
      <text:p text:style-name="P10" loext:marker-style-name="T8"><draw:line text:anchor-type="char" draw:z-index="3" draw:name="Picture 4" draw:style-name="gr1" draw:text-style-name="P11" svg:x1="4.678cm" svg:y1="0.552cm" svg:x2="16.547cm" svg:y2="0.552cm"><text:p/></draw:line><text:span text:style-name="T1">КАФЕДРА <text:s text:c="2"/></text:span><text:span text:style-name="T2">Программное обеспечение вычислительной техники</text:span><text:span text:style-name="T1"><text:tab/><text:tab/></text:span></text:p>
      <text:p text:style-name="P10" loext:marker-style-name="T8"><draw:line text:anchor-type="char" draw:z-index="4" draw:name="Picture 5" draw:style-name="gr1" draw:text-style-name="P11" svg:x1="6.253cm" svg:y1="0.543cm" svg:x2="12.07cm" svg:y2="0.543cm"><text:p/></draw:line><text:span text:style-name="T1">НАПРАВЛЕНИЕ<text:tab/></text:span><text:span text:style-name="T2">Программная инженерия</text:span></text:p>
      <text:p text:style-name="P10" loext:marker-style-name="T8"><text:span text:style-name="T1"><text:s/></text:span></text:p>
      <text:p text:style-name="P3" loext:marker-style-name="T13"><text:span text:style-name="T13">ОТЧЕТ <text:line-break/></text:span><text:span text:style-name="T14">ПО ЛАБОРАТОРНЫМ РАБОТАМ</text:span></text:p>
      <text:p text:style-name="P10"><text:span text:style-name="T15">По дисциплине</text:span><text:span text:style-name="T1">: «</text:span><text:span text:style-name="T2">Основы программирования</text:span><text:span text:style-name="T1">»</text:span></text:p>
      <text:p text:style-name="P8" loext:marker-style-name="T5"/>
      <text:p text:style-name="P3" loext:marker-style-name="T6"><draw:custom-shape text:anchor-type="char" draw:z-index="5" draw:name="Picture 6" draw:style-name="gr3" draw:text-style-name="P11" svg:width="7.591cm" svg:height="0.65cm" svg:x="11.015cm" svg:y="0.679cm"><text:p text:style-name="P1" loext:marker-style-name="T16"><text:span text:style-name="T16">Захаров Андрей Александрович</text:span></text:p><draw:enhanced-geometry draw:mirror-horizontal="false" draw:mirror-vertical="false" drawooo:sub-view-size="21600 21600" draw:text-areas="?f10 ?f11 ?f12 ?f13" svg:viewBox="0 0 0 0" draw:type="ooxml-non-primitive" draw:enhanced-path="M 0 0 L 0 21600 21600 21600 21600 0 Z N"><draw:equation draw:name="f0" draw:formula="0"/><draw:equation draw:name="f1" draw:formula="0"/><draw:equation draw:name="f2" draw:formula="1"/><draw:equation draw:name="f3" draw:formula="1"/><draw:equation draw:name="f4" draw:formula="0"/><draw:equation draw:name="f5" draw:formula="0"/><draw:equation draw:name="f6" draw:formula="21600"/><draw:equation draw:name="f7" draw:formula="21600"/><draw:equation draw:name="f8" draw:formula="21600"/><draw:equation draw:name="f9" draw:formula="21600"/><draw:equation draw:name="f10" draw:formula="?f0 *logwidth/1"/><draw:equation draw:name="f11" draw:formula="?f1 *logheight/1"/><draw:equation draw:name="f12" draw:formula="?f2 *logwidth/1"/><draw:equation draw:name="f13" draw:formula="?f3 *logheight/1"/></draw:enhanced-geometry></draw:custom-shape><text:span text:style-name="T3">Выполнил:</text:span><text:span text:style-name="T5"> </text:span><text:span text:style-name="T3">ст</text:span><text:span text:style-name="T4">удент</text:span><text:span text:style-name="T5"> </text:span><text:span text:style-name="T3">гр</text:span><text:span text:style-name="T4">уппы 090304-РПИб-о25</text:span></text:p>
      <text:p text:style-name="P8" loext:marker-style-name="T5"/>
      <text:p text:style-name="P3" loext:marker-style-name="T6"><draw:custom-shape text:anchor-type="char" draw:z-index="6" draw:name="Picture 7" draw:style-name="gr4" draw:text-style-name="P11" svg:width="6.203cm" svg:height="0.65cm" svg:x="3.898cm" svg:y="0.587cm"><text:p text:style-name="Frame_20_contents" loext:marker-style-name="T16"><text:span text:style-name="T16">Должность, звание</text:span></text:p><draw:enhanced-geometry draw:mirror-horizontal="false" draw:mirror-vertical="false" drawooo:sub-view-size="21600 21600" draw:text-areas="?f10 ?f11 ?f12 ?f13" svg:viewBox="0 0 0 0" draw:type="ooxml-non-primitive" draw:enhanced-path="M 0 0 L 0 21600 21600 21600 21600 0 Z N"><draw:equation draw:name="f0" draw:formula="0"/><draw:equation draw:name="f1" draw:formula="0"/><draw:equation draw:name="f2" draw:formula="1"/><draw:equation draw:name="f3" draw:formula="1"/><draw:equation draw:name="f4" draw:formula="0"/><draw:equation draw:name="f5" draw:formula="0"/><draw:equation draw:name="f6" draw:formula="21600"/><draw:equation draw:name="f7" draw:formula="21600"/><draw:equation draw:name="f8" draw:formula="21600"/><draw:equation draw:name="f9" draw:formula="21600"/><draw:equation draw:name="f10" draw:formula="?f0 *logwidth/1"/><draw:equation draw:name="f11" draw:formula="?f1 *logheight/1"/><draw:equation draw:name="f12" draw:formula="?f2 *logwidth/1"/><draw:equation draw:name="f13" draw:formula="?f3 *logheight/1"/></draw:enhanced-geometry></draw:custom-shape><draw:custom-shape text:anchor-type="char" draw:z-index="7" draw:name="Picture 8" draw:style-name="gr3" draw:text-style-name="P11" svg:width="7.591cm" svg:height="0.65cm" svg:x="11.024cm" svg:y="0.596cm"><text:p text:style-name="Frame_20_contents" loext:marker-style-name="T16"><text:span text:style-name="T16">Фамилия, имя, отчество</text:span></text:p><draw:enhanced-geometry draw:mirror-horizontal="false" draw:mirror-vertical="false" drawooo:sub-view-size="21600 21600" draw:text-areas="?f10 ?f11 ?f12 ?f13" svg:viewBox="0 0 0 0" draw:type="ooxml-non-primitive" draw:enhanced-path="M 0 0 L 0 21600 21600 21600 21600 0 Z N"><draw:equation draw:name="f0" draw:formula="0"/><draw:equation draw:name="f1" draw:formula="0"/><draw:equation draw:name="f2" draw:formula="1"/><draw:equation draw:name="f3" draw:formula="1"/><draw:equation draw:name="f4" draw:formula="0"/><draw:equation draw:name="f5" draw:formula="0"/><draw:equation draw:name="f6" draw:formula="21600"/><draw:equation draw:name="f7" draw:formula="21600"/><draw:equation draw:name="f8" draw:formula="21600"/><draw:equation draw:name="f9" draw:formula="21600"/><draw:equation draw:name="f10" draw:formula="?f0 *logwidth/1"/><draw:equation draw:name="f11" draw:formula="?f1 *logheight/1"/><draw:equation draw:name="f12" draw:formula="?f2 *logwidth/1"/><draw:equation draw:name="f13" draw:formula="?f3 *logheight/1"/></draw:enhanced-geometry></draw:custom-shape><text:span text:style-name="T3">Принял:</text:span><text:span text:style-name="T6"><text:tab/><text:tab/></text:span></text:p>
      <text:p text:style-name="P8" loext:marker-style-name="T5"/>
      <text:p text:style-name="P4" loext:marker-style-name="T8"><draw:custom-shape text:anchor-type="char" draw:z-index="8" draw:name="Picture 9" draw:style-name="gr2" draw:text-style-name="P11" svg:width="2.163cm" svg:height="0.65cm" svg:x="12.398cm" svg:y="0.61cm"><text:p text:style-name="Frame_20_contents" loext:marker-style-name="T16"><text:span text:style-name="T16">Подпись</text:span></text:p><draw:enhanced-geometry draw:mirror-horizontal="false" draw:mirror-vertical="false" drawooo:sub-view-size="21600 21600" draw:text-areas="?f10 ?f11 ?f12 ?f13" svg:viewBox="0 0 0 0" draw:type="ooxml-non-primitive" draw:enhanced-path="M 0 0 L 0 21600 21600 21600 21600 0 Z N"><draw:equation draw:name="f0" draw:formula="0"/><draw:equation draw:name="f1" draw:formula="0"/><draw:equation draw:name="f2" draw:formula="1"/><draw:equation draw:name="f3" draw:formula="1"/><draw:equation draw:name="f4" draw:formula="0"/><draw:equation draw:name="f5" draw:formula="0"/><draw:equation draw:name="f6" draw:formula="21600"/><draw:equation draw:name="f7" draw:formula="21600"/><draw:equation draw:name="f8" draw:formula="21600"/><draw:equation draw:name="f9" draw:formula="21600"/><draw:equation draw:name="f10" draw:formula="?f0 *logwidth/1"/><draw:equation draw:name="f11" draw:formula="?f1 *logheight/1"/><draw:equation draw:name="f12" draw:formula="?f2 *logwidth/1"/><draw:equation draw:name="f13" draw:formula="?f3 *logheight/1"/></draw:enhanced-geometry></draw:custom-shape><text:span text:style-name="T8">«___» __________ _____ г.________________</text:span></text:p>
      <text:p text:style-name="P8" loext:marker-style-name="T5"/>
      <text:p text:style-name="P8" loext:marker-style-name="T5"/>
      <text:p text:style-name="P3" loext:marker-style-name="T1"><text:span text:style-name="T1">Новочеркасск 2025 г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7:18:52.310000000</meta:creation-date>
    <dc:date>2025-10-21T18:58:31.413000000</dc:date>
    <meta:editing-duration>PT1H39M39S</meta:editing-duration>
    <meta:editing-cycles>1</meta:editing-cycles>
    <meta:document-statistic meta:table-count="0" meta:image-count="0" meta:object-count="0" meta:page-count="1" meta:paragraph-count="19" meta:word-count="64" meta:character-count="622" meta:non-whitespace-character-count="562"/>
    <meta:generator>LibreOffice/7.6.4.1$Windows_X86_64 LibreOffice_project/e19e193f88cd6c0525a17fb7a176ed8e6a3e2aa1</meta:generator>
  </office:meta>
</office:document-meta>
</file>