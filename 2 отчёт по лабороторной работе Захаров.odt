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10000027BBAD5DF10.png" manifest:media-type="image/png"/>
  <manifest:file-entry manifest:full-path="Pictures/100000010000028C00000141DDD83857.png" manifest:media-type="image/png"/>
  <manifest:file-entry manifest:full-path="Pictures/100000010000028C0000013DCABC5D94.png" manifest:media-type="image/png"/>
  <manifest:file-entry manifest:full-path="Pictures/100000010000028C0000014286065D6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cb1f2" style:font-size-asian="14pt" style:language-asian="ru" style:country-asian="RU" style:font-name-complex="Times New Roman1" style:font-size-complex="14pt" style:language-complex="ar" style:country-complex="SA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cb1f2"/>
    </style:style>
    <style:style style:name="P3" style:family="paragraph" style:parent-style-name="Standard">
      <style:paragraph-properties fo:line-height="150%" fo:text-align="center" style:justify-single-word="false" fo:text-indent="1.251cm" style:auto-text-indent="false"/>
      <style:text-properties officeooo:paragraph-rsid="001cb1f2"/>
    </style:style>
    <style:style style:name="P4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cb1f2"/>
    </style:style>
    <style:style style:name="P5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1cb1f2"/>
    </style:style>
    <style:style style:name="P6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1fd955"/>
    </style:style>
    <style:style style:name="P7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fd955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fd955"/>
    </style:style>
    <style:style style:name="P9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fo:font-weight="bold" officeooo:paragraph-rsid="001cb1f2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fd955" officeooo:paragraph-rsid="001fd955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paragraph-rsid="001cb1f2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 fo:text-indent="1.251cm" style:auto-text-indent="false"/>
      <style:text-properties officeooo:rsid="001fd955" officeooo:paragraph-rsid="001fd955"/>
    </style:style>
    <style:style style:name="P13" style:family="paragraph" style:parent-style-name="Standard">
      <style:paragraph-properties fo:line-height="150%" fo:text-align="justify" style:justify-single-word="false" fo:text-indent="0cm" style:auto-text-indent="false"/>
      <style:text-properties officeooo:rsid="001fd955" officeooo:paragraph-rsid="001fd955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1ddda2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1fd955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officeooo:rsid="001cb1f2" style:font-size-asian="14pt" style:font-name-complex="Times New Roman1" style:font-size-complex="14pt"/>
    </style:style>
    <style:style style:name="T7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Лабораторная работа № </text:span><text:span text:style-name="T2">2</text:span></text:p>
      <text:p text:style-name="P3" loext:marker-style-name="T1"><text:span text:style-name="T1">ВВЕДЕНИ</text:span><text:bookmark text:name="_GoBack"/><text:span text:style-name="T1">Е В ЯЗЫК ПРОГРАММИРОВАНИЯ PYTHON</text:span></text:p>
      <text:p text:style-name="P9" loext:marker-style-name="T1"/>
      <text:p text:style-name="P4" loext:marker-style-name="T4"><text:span text:style-name="T1">Цель работы</text:span><text:span text:style-name="T4">: изучить понятие и свойства алгоритмов и получить базовые навыки написания кода на языке Python.</text:span></text:p>
      <text:p text:style-name="P4" loext:marker-style-name="T4"><text:span text:style-name="T4"/></text:p>
      <text:p text:style-name="P2" loext:marker-style-name="T4"><text:span text:style-name="T4">Вариант №</text:span><text:span text:style-name="T6">1</text:span></text:p>
      <text:p text:style-name="P4" loext:marker-style-name="T4"><text:span text:style-name="T1">Задание:</text:span><text:span text:style-name="T5"> <text:s/>При выполнении задания предусмотреть выбор функции f(x).</text:span></text:p>
      <text:p text:style-name="P4" loext:marker-style-name="T4"><text:span text:style-name="T5">Предусмотреть вывод информации о выбранной ветви вычислений.</text:span></text:p>
      <text:p text:style-name="P1"/>
      <text:p text:style-name="P4" loext:marker-style-name="T1"><text:span text:style-name="T1">Блок схема:</text:span></text:p>
      <text:p text:style-name="P6" loext:marker-style-name="T1"><draw:frame draw:style-name="fr1" draw:name="Изображение1" text:anchor-type="char" svg:width="13.623cm" svg:height="15.341cm" draw:z-index="3"><draw:image xlink:href="Pictures/10000001000002210000027BBAD5DF10.png" xlink:type="simple" xlink:show="embed" xlink:actuate="onLoad" draw:mime-type="image/png"/></draw:frame><text:span text:style-name="T1">Листинг: </text:span></text:p>
      <text:p text:style-name="P7" loext:marker-style-name="T1"><text:soft-page-break/><text:span text:style-name="T7">import math</text:span></text:p>
      <text:p text:style-name="P11" loext:marker-style-name="T1"><text:span text:style-name="T4"/></text:p>
      <text:p text:style-name="P11" loext:marker-style-name="T1"><text:span text:style-name="T4">def c_vichilnie(x, y, k):</text:span></text:p>
      <text:p text:style-name="P11" loext:marker-style-name="T1"><text:span text:style-name="T4">## выбор функции</text:span></text:p>
      <text:p text:style-name="P11" loext:marker-style-name="T1"><text:span text:style-name="T4"><text:s text:c="4"/>if k == 1:</text:span></text:p>
      <text:p text:style-name="P11" loext:marker-style-name="T1"><text:span text:style-name="T4"><text:s text:c="8"/>f_x = math.cos(y)</text:span></text:p>
      <text:p text:style-name="P11" loext:marker-style-name="T1"><text:span text:style-name="T4"><text:s text:c="4"/>elif k == 2:</text:span></text:p>
      <text:p text:style-name="P11" loext:marker-style-name="T1"><text:span text:style-name="T4"><text:s text:c="8"/>f_x = math.e**(math.sin(x))</text:span></text:p>
      <text:p text:style-name="P11" loext:marker-style-name="T1"><text:span text:style-name="T4"><text:s text:c="4"/>elif k == 3:</text:span></text:p>
      <text:p text:style-name="P11" loext:marker-style-name="T1"><text:span text:style-name="T4"><text:s text:c="8"/>f_x = math.log(y)</text:span></text:p>
      <text:p text:style-name="P11" loext:marker-style-name="T1"><text:span text:style-name="T4"><text:s text:c="4"/>else:</text:span></text:p>
      <text:p text:style-name="P11" loext:marker-style-name="T1"><text:span text:style-name="T4"><text:s text:c="8"/>print("Неправильный выбор функции. Введите 1, 2 или 3.")</text:span></text:p>
      <text:p text:style-name="P11" loext:marker-style-name="T1"><text:span text:style-name="T4"><text:s text:c="8"/>return None</text:span></text:p>
      <text:p text:style-name="P11" loext:marker-style-name="T1"><text:span text:style-name="T4"><text:s text:c="4"/></text:span></text:p>
      <text:p text:style-name="P11" loext:marker-style-name="T1"><text:span text:style-name="T4"><text:s text:c="4"/>xy_abs = abs(x*y)</text:span></text:p>
      <text:p text:style-name="P11" loext:marker-style-name="T1"><text:span text:style-name="T4"><text:s text:c="4"/></text:span></text:p>
      <text:p text:style-name="P11" loext:marker-style-name="T1"><text:span text:style-name="T4">## вычесление функции и вывод</text:span></text:p>
      <text:p text:style-name="P11" loext:marker-style-name="T1"><text:span text:style-name="T4"><text:s text:c="4"/>if xy_abs &gt; 12:</text:span></text:p>
      <text:p text:style-name="P11" loext:marker-style-name="T1"><text:span text:style-name="T4"><text:s text:c="8"/>c = math.log(abs(f_x))</text:span></text:p>
      <text:p text:style-name="P11" loext:marker-style-name="T1"><text:span text:style-name="T4"><text:s text:c="8"/>print("Выбрана первая ветвь: c = ln(|f(x)|)")</text:span></text:p>
      <text:p text:style-name="P11" loext:marker-style-name="T1"><text:span text:style-name="T4"/></text:p>
      <text:p text:style-name="P11" loext:marker-style-name="T1"><text:span text:style-name="T4"><text:s text:c="4"/>elif xy_abs &lt; 12:</text:span></text:p>
      <text:p text:style-name="P11" loext:marker-style-name="T1"><text:span text:style-name="T4"><text:s text:c="8"/>c = abs(f_x)**(1/3) + math.e**(f_x)</text:span></text:p>
      <text:p text:style-name="P11" loext:marker-style-name="T1"><text:span text:style-name="T4"><text:s text:c="8"/>print("Выбрана вторая ветвь: c = (|f(x)|)^(1/2) + e^(f(x))")</text:span></text:p>
      <text:p text:style-name="P11" loext:marker-style-name="T1"><text:span text:style-name="T4"/></text:p>
      <text:p text:style-name="P11" loext:marker-style-name="T1"><text:span text:style-name="T4"><text:s text:c="4"/>elif xy_abs == 12:</text:span></text:p>
      <text:p text:style-name="P11" loext:marker-style-name="T1"><text:span text:style-name="T4"><text:s text:c="8"/>c = ((f_x)**2)**(1/3) + y**(1/2)</text:span></text:p>
      <text:p text:style-name="P11" loext:marker-style-name="T1"><text:span text:style-name="T4"><text:s text:c="8"/>print("Выбрана третья ветвь: с = ((f(x))^2)^(1\3) + y^(1\2)")</text:span></text:p>
      <text:p text:style-name="P11" loext:marker-style-name="T1"><text:span text:style-name="T4"/></text:p>
      <text:p text:style-name="P11" loext:marker-style-name="T1"><text:span text:style-name="T4"><text:s text:c="4"/>else:</text:span></text:p>
      <text:p text:style-name="P11" loext:marker-style-name="T1"><text:soft-page-break/><text:span text:style-name="T4"><text:s text:c="8"/>print(None)</text:span></text:p>
      <text:p text:style-name="P11" loext:marker-style-name="T1"><text:span text:style-name="T4"><text:s text:c="8"/></text:span></text:p>
      <text:p text:style-name="P11" loext:marker-style-name="T1"><text:span text:style-name="T4"><text:s text:c="4"/>return c</text:span></text:p>
      <text:p text:style-name="P11" loext:marker-style-name="T1"><text:span text:style-name="T4"/></text:p>
      <text:p text:style-name="P11" loext:marker-style-name="T1"><text:span text:style-name="T4">x = float(input("Введите x: "))</text:span></text:p>
      <text:p text:style-name="P11" loext:marker-style-name="T1"><text:span text:style-name="T4">y = float(input("Введите y: "))</text:span></text:p>
      <text:p text:style-name="P11" loext:marker-style-name="T1"><text:span text:style-name="T4">k = int(input("Выберите функцию f(x): 1 - cos(y), 2 - e^(sin(x)), 3 - ln(y): "))</text:span></text:p>
      <text:p text:style-name="P11" loext:marker-style-name="T1"><text:span text:style-name="T4"/></text:p>
      <text:p text:style-name="P11" loext:marker-style-name="T1"><text:span text:style-name="T4">c = c_vichilnie(x, y, k)</text:span></text:p>
      <text:p text:style-name="P11" loext:marker-style-name="T1"><text:span text:style-name="T4">print(f"Результат: c = {c}")</text:span></text:p>
      <text:p text:style-name="P4" loext:marker-style-name="T1"><text:span text:style-name="T1">Результаты выполнения программы: </text:span></text:p>
      <text:p text:style-name="P12" loext:marker-style-name="T1"><text:span text:style-name="T1">1 Выбор функции</text:span></text:p>
      <text:p text:style-name="P8" loext:marker-style-name="T1"><draw:frame draw:style-name="fr3" draw:name="Изображение2" text:anchor-type="char" svg:x="0cm" svg:y="-0.22cm" svg:width="17cm" svg:height="6.978cm" draw:z-index="0"><draw:image xlink:href="Pictures/100000010000028C00000141DDD83857.png" xlink:type="simple" xlink:show="embed" xlink:actuate="onLoad" draw:mime-type="image/png"/></draw:frame><text:span text:style-name="T3">2 Выбор функции</text:span></text:p>
      <text:p text:style-name="P10" loext:marker-style-name="T1"><draw:frame draw:style-name="fr2" draw:name="Изображение3" text:anchor-type="char" svg:width="17cm" svg:height="6.625cm" draw:z-index="1"><draw:image xlink:href="Pictures/100000010000028C0000013DCABC5D94.png" xlink:type="simple" xlink:show="embed" xlink:actuate="onLoad" draw:mime-type="image/png"/></draw:frame></text:p>
      <text:p text:style-name="P13" loext:marker-style-name="T1"><text:soft-page-break/><text:span text:style-name="T1">3 Выбор функции</text:span></text:p>
      <text:p text:style-name="P5" loext:marker-style-name="T1"><draw:frame draw:style-name="fr2" draw:name="Изображение4" text:anchor-type="char" svg:width="17cm" svg:height="8.394cm" draw:z-index="2"><draw:image xlink:href="Pictures/100000010000028C0000014286065D61.png" xlink:type="simple" xlink:show="embed" xlink:actuate="onLoad" draw:mime-type="image/png"/></draw:frame><text:span text:style-name="T1">Вывод: </text:span><text:span text:style-name="T3">В данной лабораторной работе было разработано задание в котором нужно было предусмотреть выбор функции f(x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17:35:49.856000000</meta:creation-date>
    <dc:date>2025-10-21T22:29:55.601000000</dc:date>
    <meta:editing-duration>PT2H1M36S</meta:editing-duration>
    <meta:editing-cycles>4</meta:editing-cycles>
    <meta:generator>LibreOffice/7.6.4.1$Windows_X86_64 LibreOffice_project/e19e193f88cd6c0525a17fb7a176ed8e6a3e2aa1</meta:generator>
    <meta:document-statistic meta:table-count="0" meta:image-count="4" meta:object-count="0" meta:page-count="4" meta:paragraph-count="47" meta:word-count="207" meta:character-count="1459" meta:non-whitespace-character-count="1141"/>
  </office:meta>
</office:document-meta>
</file>